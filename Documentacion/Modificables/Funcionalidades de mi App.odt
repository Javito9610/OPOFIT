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fo:font-size="24pt" style:font-size-asian="24pt" style:font-size-complex="24pt"/>
    </style:style>
    <style:style style:name="P3" style:parent-style-name="Párrafodelista" style:list-style-name="LFO1" style:family="paragraph">
      <style:paragraph-properties fo:text-align="justify"/>
    </style:style>
    <style:style style:name="P4" style:parent-style-name="Párrafodelista" style:list-style-name="LFO1" style:family="paragraph">
      <style:paragraph-properties fo:text-align="justify"/>
    </style:style>
    <style:style style:name="P5" style:parent-style-name="Párrafodelista" style:family="paragraph">
      <style:paragraph-properties fo:text-align="justify"/>
    </style:style>
    <style:style style:name="P6" style:parent-style-name="Párrafodelista" style:list-style-name="LFO1" style:family="paragraph">
      <style:paragraph-properties fo:text-align="justify"/>
    </style:style>
    <style:style style:name="P7" style:parent-style-name="Párrafodelista" style:family="paragraph">
      <style:paragraph-properties fo:text-align="justify"/>
    </style:style>
    <style:style style:name="P8" style:parent-style-name="Párrafodelista" style:list-style-name="LFO1" style:family="paragraph">
      <style:paragraph-properties fo:text-align="justify"/>
    </style:style>
    <style:style style:name="P9" style:parent-style-name="Párrafodelista" style:list-style-name="LFO1" style:family="paragraph">
      <style:paragraph-properties fo:text-align="justify"/>
    </style:style>
    <style:style style:name="P10" style:parent-style-name="Párrafodelista" style:list-style-name="LFO1" style:family="paragraph">
      <style:paragraph-properties fo:text-align="justify"/>
    </style:style>
    <style:style style:name="P11" style:parent-style-name="Párrafodelista" style:list-style-name="LFO1" style:family="paragraph">
      <style:paragraph-properties fo:text-align="justify"/>
    </style:style>
    <style:style style:name="P12" style:parent-style-name="Párrafodelista" style:list-style-name="LFO1" style:family="paragraph">
      <style:paragraph-properties fo:text-align="justify"/>
    </style:style>
    <style:style style:name="P13" style:parent-style-name="Párrafodelista" style:list-style-name="LFO1" style:family="paragraph">
      <style:paragraph-properties fo:text-align="justify"/>
    </style:style>
    <style:style style:name="P14" style:parent-style-name="Párrafodelista" style:list-style-name="LFO1" style:family="paragraph">
      <style:paragraph-properties fo:text-align="justify"/>
    </style:style>
    <style:style style:name="P15" style:parent-style-name="Párrafodelista" style:list-style-name="LFO1"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margin-left="0.25in">
        <style:tab-stops/>
      </style:paragraph-properties>
    </style:style>
  </office:automatic-styles>
  <office:body>
    <office:text text:use-soft-page-breaks="true">
      <text:p text:style-name="P1">Funcionalidades de la App:</text:p>
      <text:p text:style-name="P2"/>
      <text:list text:style-name="LFO1" text:continue-numbering="true">
        <text:list-item>
          <text:p text:style-name="P3">Landing: Tendrá una vista web de presentación para que los usuarios puedan acceder a su descarga, mediante un botón que la iniciará, para su posterior uso en plataforma móvil.</text:p>
        </text:list-item>
        <text:list-item>
          <text:p text:style-name="P4">Inicio/registro: Una vista de Inicio/registro donde introducir el email y la contraseña para iniciar sesión o “clicar” en la opción de registro, para dirigirse a otra vista donde introducir todos los datos de registro: Email, nueva contraseña, nombre de usuario, género, peso, IMC, altura y marcas actuales en las pruebas físicas.</text:p>
        </text:list-item>
      </text:list>
      <text:p text:style-name="P5">Esta vista también tendrá un link, por si el usuario olvida la contraseña, para que pueda recuperarla. En este caso también se redirige a otra vista, la cual introduciendo el correo del usuario, le envía un email a dicho correo de cambio de contraseña, donde si clicamos en el link que contiene, nos llevara a una vista donde introducir la nueva contraseña.</text:p>
      <text:list text:style-name="LFO1" text:continue-numbering="true">
        <text:list-item>
          <text:p text:style-name="P6">Cuando el usuario se registra, en función de los datos introducidos y la oposición a la que se quiere enfrentar, aparecerá una rutina ideal para que el usuario pueda seguir, pudiendo cambiar de rutina (de las tres que hay para ese objetivo: Nivel1, nivel2 y nivel3) si éste sube de nivel o mejoran sus marcas.</text:p>
        </text:list-item>
      </text:list>
      <text:p text:style-name="P7">Si el usuario no quiere seguir dicha rutina y quiere llevar a cabo un entrenamiento libre, creando su propia rutina y registrándola en la app, podrá hacerlo después de renunciar la rutina propuesta para la app.</text:p>
      <text:list text:style-name="LFO1" text:continue-numbering="true">
        <text:list-item>
          <text:p text:style-name="P8">Una vista de las rutinas de entrenamiento en función al objetivo (oposición), en la cual solamente se podrá seleccionar la rutina acorde al nivel actual del usuario, para poder comenzar el ejercicio.</text:p>
        </text:list-item>
        <text:list-item>
          <text:p text:style-name="P9">Una vista de perfil donde poder editar los datos del usuario, de tal forma que si se mejoran las marcas de las distintas pruebas, la app lance una propuesta de comenzar con la rutina del siguiente nivel, para así hacerla accesible en la vista del punto anterior.</text:p>
        </text:list-item>
        <text:list-item>
          <text:p text:style-name="P10">En los entrenamientos, ya bien sean ejercicios de fuerza, resistencia o velocidad, podremos registrar la fecha del entrenamiento y las marcas conseguidas, de forma que el usuario pueda ver su progreso más tarde en su historial.</text:p>
        </text:list-item>
        <text:list-item>
          <text:p text:style-name="P11">Una vista en la que se explique con detalle cada una de las pruebas enfocada a dicha oposición, trucos, etc.</text:p>
        </text:list-item>
        <text:list-item>
          <text:p text:style-name="P12"><text:s/>Vista correspondiente a los entrenamientos y rutinas libres para aquellos usuarios que no quieran seguir las pautas o entrenamientos propuestos por la app.</text:p>
        </text:list-item>
        <text:list-item>
          <text:p text:style-name="P13">Vista en la que se podrán ver todos los progresos/ historial relacionado con el entrenamiento.</text:p>
        </text:list-item>
        <text:list-item>
          <text:p text:style-name="P14">Vista de settings, donde poder cambiar las unidades de medida.</text:p>
        </text:list-item>
        <text:list-item>
          <text:p text:style-name="P15">Vista principal en la que se tenga opción de acceder al perfil para editar marcas, acceder a las rutinas propuestas por la app, a los progresos al historial de entrenos y a las rutinas libres creadas por el usuario.</text:p>
        </text:list-item>
      </text:list>
      <text:p text:style-name="P16"/>
      <text:p text:style-name="P17"/>
      <text:p text:style-name="Párrafode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FAEL JAVIER LUENGO BARRENO</meta:initial-creator>
    <dc:creator>RAFAEL JAVIER LUENGO BARRENO</dc:creator>
    <meta:creation-date>2025-12-29T17:11:00Z</meta:creation-date>
    <dc:date>2026-01-04T12:35:00Z</dc:date>
    <meta:template xlink:href="Normal" xlink:type="simple"/>
    <meta:editing-cycles>5</meta:editing-cycles>
    <meta:editing-duration>PT34440S</meta:editing-duration>
    <meta:document-statistic meta:page-count="2" meta:paragraph-count="5" meta:word-count="422" meta:character-count="2743" meta:row-count="19" meta:non-whitespace-character-count="2326"/>
  </office:meta>
</office:document-meta>
</file>